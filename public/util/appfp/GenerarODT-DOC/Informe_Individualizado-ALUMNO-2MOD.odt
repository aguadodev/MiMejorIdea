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7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9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11" style:family="paragraph" style:parent-style-name="nota1">
      <style:paragraph-properties fo:margin-top="0.106cm" fo:margin-bottom="0.106cm" style:contextual-spacing="false" style:text-autospace="ideograph-alpha"/>
    </style:style>
    <style:style style:name="P12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15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8" style:family="paragraph" style:parent-style-name="tt1cn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</style:style>
    <style:style style:name="P20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3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4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tt1n">
      <style:paragraph-properties fo:margin-top="0.035cm" fo:margin-bottom="0.212cm" style:contextual-spacing="false"/>
    </style:style>
    <style:style style:name="P3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3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2" style:font-size-complex="7pt"/>
    </style:style>
    <style:style style:name="P3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2" style:font-size-complex="7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3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37" style:family="paragraph" style:parent-style-name="tt1c">
      <style:paragraph-properties fo:margin-top="0.035cm" fo:margin-bottom="0.035cm" style:contextual-spacing="false"/>
    </style:style>
    <style:style style:name="P38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9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40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2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4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2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ebdings" fo:font-size="10pt" fo:language="fr" fo:country="FR" style:font-size-asian="10pt" style:font-name-complex="Webdings" style:font-size-complex="12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name-complex="Arial2" style:font-size-complex="7pt"/>
    </style:style>
    <style:style style:name="T11" style:family="text">
      <style:text-properties officeooo:rsid="000b5ee4"/>
    </style:style>
    <style:style style:name="T12" style:family="text">
      <style:text-properties officeooo:rsid="0008b503"/>
    </style:style>
    <style:style style:name="T13" style:family="text">
      <style:text-properties officeooo:rsid="0007407c"/>
    </style:style>
    <style:style style:name="T14" style:family="text">
      <style:text-properties officeooo:rsid="0011c122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Informe de avaliación individualizado</text:span><text:span text:style-name="Símbolo_20_de_20_nota_20_al_20_pie"><text:span text:style-name="T8"><text:note text:id="ftn1" text:note-class="footnote"><text:note-citation>1</text:note-citation><text:note-body><text:p text:style-name="P11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5"><text:span text:style-name="T9">Ciclo formativo </text:span><text:span text:style-name="T9"><draw:control text:anchor-type="as-char" draw:z-index="16" draw:name="Control 5" draw:style-name="gr3" draw:text-style-name="P43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5"><text:span text:style-name="T9">Réxime</text:span> <text:span text:style-name="T10">(ordinario, modular) </text:span><text:span text:style-name="T10"><draw:control text:anchor-type="as-char" draw:z-index="17" draw:name="Control 6" draw:style-name="gr3" draw:text-style-name="P43" svg:width="4.843cm" svg:height="0.722cm" draw:control="control10"/></text:span></text:p>
          </table:table-cell>
          <table:table-cell table:style-name="Tabla1.A2" office:value-type="string">
            <text:p text:style-name="P23">Ano académico <draw:control text:anchor-type="as-char" draw:z-index="18" draw:name="Control 7" draw:style-name="gr3" draw:text-style-name="P43" svg:width="4.262cm" svg:height="0.722cm" draw:control="control11"/></text:p>
          </table:table-cell>
          <table:table-cell table:style-name="Tabla1.C2" office:value-type="string">
            <text:p text:style-name="P15"><text:span text:style-name="T9">Grupo </text:span><text:span text:style-name="T9"><draw:control text:anchor-type="as-char" draw:z-index="19" draw:name="Control 8" draw:style-name="gr3" draw:text-style-name="P43" svg:width="1.405cm" svg:height="0.722cm" draw:control="control12"/></text:span></text:p>
          </table:table-cell>
        </table:table-row>
      </table:table>
      <text:p text:style-name="P29"/>
      <text:p text:style-name="P30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text:span text:style-name="T9">Apelidos</text:span> <draw:control text:anchor-type="as-char" draw:z-index="20" draw:name="Control 9" draw:style-name="gr3" draw:text-style-name="P43" svg:width="5.691cm" svg:height="0.722cm" draw:control="control13"/></text:p>
          </table:table-cell>
          <table:table-cell table:style-name="Tabla2.A1" office:value-type="string">
            <text:p text:style-name="P17"><text:span text:style-name="T9">Nome </text:span><text:span text:style-name="T9"><draw:control text:anchor-type="as-char" draw:z-index="21" draw:name="Control 1" draw:style-name="gr3" draw:text-style-name="P43" svg:width="5.038cm" svg:height="0.722cm" draw:control="control14"/></text:span></text:p>
          </table:table-cell>
          <table:table-cell table:style-name="Tabla2.C1" office:value-type="string">
            <text:p text:style-name="P24">DNI/NIE <draw:control text:anchor-type="as-char" draw:z-index="22" draw:name="Control 3" draw:style-name="gr3" draw:text-style-name="P43" svg:width="3.252cm" svg:height="0.722cm" draw:control="control15"/></text:p>
          </table:table-cell>
        </table:table-row>
      </table:table>
      <text:p text:style-name="P29"/>
      <text:p text:style-name="P31">2. Cualificacións nos módulos profesionais, <text:span text:style-name="T11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Módulo profesional</text:p>
          </table:table-cell>
          <table:table-cell table:style-name="Tabla3.A1" office:value-type="string">
            <text:p text:style-name="P32"><draw:control text:anchor-type="as-char" draw:z-index="10" draw:name="Control 4" draw:style-name="gr3" draw:text-style-name="P43" svg:width="8.238cm" svg:height="0.722cm" draw:control="control3"/></text:p>
          </table:table-cell>
          <table:table-cell table:style-name="Tabla3.A1" office:value-type="string">
            <text:p text:style-name="P25">Convocatoria</text:p>
          </table:table-cell>
          <table:table-cell table:style-name="Tabla3.A1" office:value-type="string">
            <text:p text:style-name="P34"><draw:control text:anchor-type="as-char" draw:z-index="11" draw:name="Control 12" draw:style-name="gr3" draw:text-style-name="P43" svg:width="0.773cm" svg:height="0.722cm" draw:control="control4"/></text:p>
          </table:table-cell>
          <table:table-cell table:style-name="Tabla3.A1" office:value-type="string">
            <text:p text:style-name="P25">Cualificación</text:p>
          </table:table-cell>
          <table:table-cell table:style-name="Tabla3.F1" office:value-type="string">
            <text:p text:style-name="P34"><draw:control text:anchor-type="as-char" draw:z-index="12" draw:name="Control 20" draw:style-name="gr3" draw:text-style-name="P43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5" office:value-type="string">
            <text:p text:style-name="P26"><draw:control text:anchor-type="as-char" draw:z-index="13" draw:name="Control 28" draw:style-name="gr2" draw:text-style-name="P43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12">propostas</text:span></text:p>
          </table:table-cell>
          <table:table-cell table:style-name="Tabla3.B2" table:number-columns-spanned="5" office:value-type="string">
            <text:p text:style-name="P26"><draw:control text:anchor-type="as-char" svg:y="-0.79cm" draw:z-index="14" draw:name="Control 28" draw:style-name="gr1" draw:text-style-name="P43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35">Medidas de atención á diversidade adoptadas</text:p>
          </table:table-cell>
          <table:table-cell table:style-name="Tabla3.B2" table:number-columns-spanned="5" office:value-type="string">
            <text:p text:style-name="P26"><draw:control text:anchor-type="as-char" svg:y="-0.79cm" draw:z-index="15" draw:name="Control 14" draw:style-name="gr1" draw:text-style-name="P43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42"/>
      <text:p text:style-name="P4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2">Módulo profesional</text:p>
          </table:table-cell>
          <table:table-cell table:style-name="Tabla6.A1" office:value-type="string">
            <text:p text:style-name="P33"><draw:control text:anchor-type="as-char" draw:z-index="24" draw:name="Control 10" draw:style-name="gr3" draw:text-style-name="P43" svg:width="8.238cm" svg:height="0.722cm" draw:control="control17"/></text:p>
          </table:table-cell>
          <table:table-cell table:style-name="Tabla6.A1" office:value-type="string">
            <text:p text:style-name="P28">Convocatoria</text:p>
          </table:table-cell>
          <table:table-cell table:style-name="Tabla6.A1" office:value-type="string">
            <text:p text:style-name="P41"><draw:control text:anchor-type="as-char" draw:z-index="25" draw:name="Control 11" draw:style-name="gr3" draw:text-style-name="P43" svg:width="0.773cm" svg:height="0.722cm" draw:control="control18"/></text:p>
          </table:table-cell>
          <table:table-cell table:style-name="Tabla6.A1" office:value-type="string">
            <text:p text:style-name="P28">Cualificación</text:p>
          </table:table-cell>
          <table:table-cell table:style-name="Tabla6.F1" office:value-type="string">
            <text:p text:style-name="P41"><draw:control text:anchor-type="as-char" draw:z-index="26" draw:name="Control 13" draw:style-name="gr3" draw:text-style-name="P43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22">Valoración da aprendizaxe</text:p>
          </table:table-cell>
          <table:table-cell table:style-name="Tabla6.B2" table:number-columns-spanned="5" office:value-type="string">
            <text:p text:style-name="P27"><draw:control text:anchor-type="as-char" draw:z-index="27" draw:name="Control 15" draw:style-name="gr2" draw:text-style-name="P43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2">Actividades de recuperación <text:span text:style-name="T12">propostas</text:span></text:p>
          </table:table-cell>
          <table:table-cell table:style-name="Tabla6.B2" table:number-columns-spanned="5" office:value-type="string">
            <text:p text:style-name="P27"><draw:control text:anchor-type="as-char" svg:y="-0.79cm" draw:z-index="28" draw:name="Control 16" draw:style-name="gr1" draw:text-style-name="P43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36">Medidas de atención á diversidade adoptadas</text:p>
          </table:table-cell>
          <table:table-cell table:style-name="Tabla6.B2" table:number-columns-spanned="5" office:value-type="string">
            <text:p text:style-name="P27"><draw:control text:anchor-type="as-char" svg:y="-0.79cm" draw:z-index="29" draw:name="Control 19" draw:style-name="gr1" draw:text-style-name="P43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42"/>
      <text:p text:style-name="P42"><text:soft-page-break/></text:p>
      <text:p text:style-name="P42"/>
      <text:p text:style-name="P42"><text:span text:style-name="T14">3</text:span>. <text:span text:style-name="T14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draw:control text:anchor-type="as-char" svg:y="-0.138cm" draw:z-index="23" draw:name="Control 2" draw:style-name="gr1" draw:text-style-name="P43" svg:width="17.888cm" svg:height="2.001cm" draw:control="control16"/></text:p>
          </table:table-cell>
        </table:table-row>
      </table:table>
      <text:p text:style-name="P14"/>
      <text:p text:style-name="P14">Marín, <draw:control text:anchor-type="as-char" draw:z-index="8" draw:name="Control 17" draw:style-name="gr3" draw:text-style-name="P43" svg:width="5.315cm" svg:height="0.722cm" draw:control="control1"/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9">A <text:span text:style-name="T13">D</text:span>irectora</text:p>
            <text:p text:style-name="P37">Asdo.: Alicia Alonso Iglesias</text:p>
          </table:table-cell>
          <table:table-cell table:style-name="Tabla5.A1" office:value-type="string">
            <text:p text:style-name="P38">Selo </text:p>
            <text:p text:style-name="P39">do centro</text:p>
          </table:table-cell>
          <table:table-cell table:style-name="Tabla5.A1" office:value-type="string">
            <text:p text:style-name="P20">Profesor/<text:span text:style-name="T13">a</text:span> <text:span text:style-name="T13">T</text:span>itor/<text:span text:style-name="T13">a</text:span></text:p>
            <text:p text:style-name="P20">Asdo.: <draw:control text:anchor-type="as-char" draw:z-index="9" draw:name="Control 18" draw:style-name="gr3" draw:text-style-name="P43" svg:width="5.315cm" svg:height="0.722cm" draw:control="control2"/></text:p>
            <text:p text:style-name="P4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1"><draw:image xlink:href="Pictures/10000000000001B50000009505455040948CBA9A.png" xlink:type="simple" xlink:show="embed" xlink:actuate="onLoad" draw:mime-type="image/png"/></draw:frame><draw:frame draw:style-name="Mfr2" draw:name="Imagen6" text:anchor-type="char" svg:x="16.2cm" svg:y="0.288cm" svg:width="3.03cm" svg:height="1.713cm" draw:z-index="3"><draw:image xlink:href="Pictures/100000000000064700000429FC701CB86886B9EE.png" xlink:type="simple" xlink:show="embed" xlink:actuate="onLoad" draw:mime-type="image/png"/></draw:frame><draw:line text:anchor-type="char" draw:z-index="5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7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2</text:page-number></text:span><text:span text:style-name="MT7"><text:s/>de </text:span>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forme Individualizado</dc:title>
    <meta:initial-creator>Xesús Cociña Souto</meta:initial-creator>
    <meta:editing-cycles>74</meta:editing-cycles>
    <meta:editing-duration>PT8H2M16S</meta:editing-duration>
    <meta:generator>LibreOffice/7.3.3.2$Windows_X86_64 LibreOffice_project/d1d0ea68f081ee2800a922cac8f79445e4603348</meta:generator>
    <meta:printed-by>Archivos PDF</meta:printed-by>
    <dc:date>2026-06-19T00:18:07.394000000</dc:date>
    <meta:document-statistic meta:table-count="6" meta:image-count="2" meta:object-count="0" meta:page-count="2" meta:paragraph-count="50" meta:word-count="152" meta:character-count="1087" meta:non-whitespace-character-count="956"/>
  </office:meta>
</office:document-meta>
</file>