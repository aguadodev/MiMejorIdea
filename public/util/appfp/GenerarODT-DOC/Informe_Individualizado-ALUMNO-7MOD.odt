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11.906cm"/>
    </style:style>
    <style:style style:name="Tabla6.C" style:family="table-column">
      <style:table-column-properties style:column-width="1.984cm"/>
    </style:style>
    <style:style style:name="Tabla6.D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11.906cm"/>
    </style:style>
    <style:style style:name="Tabla7.C" style:family="table-column">
      <style:table-column-properties style:column-width="1.984cm"/>
    </style:style>
    <style:style style:name="Tabla7.D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11.906cm"/>
    </style:style>
    <style:style style:name="Tabla8.C" style:family="table-column">
      <style:table-column-properties style:column-width="1.984cm"/>
    </style:style>
    <style:style style:name="Tabla8.D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11.906cm"/>
    </style:style>
    <style:style style:name="Tabla9.C" style:family="table-column">
      <style:table-column-properties style:column-width="1.984cm"/>
    </style:style>
    <style:style style:name="Tabla9.D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8.168cm" fo:margin-left="0.042cm" table:align="left" style:writing-mode="lr-tb"/>
    </style:style>
    <style:style style:name="Tabla10.A" style:family="table-column">
      <style:table-column-properties style:column-width="3.11cm"/>
    </style:style>
    <style:style style:name="Tabla10.B" style:family="table-column">
      <style:table-column-properties style:column-width="11.906cm"/>
    </style:style>
    <style:style style:name="Tabla10.C" style:family="table-column">
      <style:table-column-properties style:column-width="1.984cm"/>
    </style:style>
    <style:style style:name="Tabla10.D" style:family="table-column">
      <style:table-column-properties style:column-width="1.168cm"/>
    </style:style>
    <style:style style:name="Tabla10.1" style:family="table-row">
      <style:table-row-properties style:min-row-height="0.115cm" fo:keep-together="auto"/>
    </style:style>
    <style:style style:name="Tabla10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0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1.448cm" fo:keep-together="auto"/>
    </style:style>
    <style:style style:name="Tabla10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0.3" style:family="table-row">
      <style:table-row-properties style:min-row-height="2.282cm" fo:keep-together="auto"/>
    </style:style>
    <style:style style:name="Tabla10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11" style:family="table">
      <style:table-properties style:width="18.168cm" fo:margin-left="0.042cm" table:align="left" style:writing-mode="lr-tb"/>
    </style:style>
    <style:style style:name="Tabla11.A" style:family="table-column">
      <style:table-column-properties style:column-width="3.11cm"/>
    </style:style>
    <style:style style:name="Tabla11.B" style:family="table-column">
      <style:table-column-properties style:column-width="11.906cm"/>
    </style:style>
    <style:style style:name="Tabla11.C" style:family="table-column">
      <style:table-column-properties style:column-width="1.984cm"/>
    </style:style>
    <style:style style:name="Tabla11.D" style:family="table-column">
      <style:table-column-properties style:column-width="1.168cm"/>
    </style:style>
    <style:style style:name="Tabla11.1" style:family="table-row">
      <style:table-row-properties style:min-row-height="0.115cm" fo:keep-together="auto"/>
    </style:style>
    <style:style style:name="Tabla11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11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11.2" style:family="table-row">
      <style:table-row-properties style:min-row-height="1.448cm" fo:keep-together="auto"/>
    </style:style>
    <style:style style:name="Tabla11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11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11.3" style:family="table-row">
      <style:table-row-properties style:min-row-height="2.282cm" fo:keep-together="auto"/>
    </style:style>
    <style:style style:name="Tabla11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08b503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7b0e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2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dd99"/>
    </style:style>
    <style:style style:name="P2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3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32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33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3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4456c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39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40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649ee"/>
    </style:style>
    <style:style style:name="P4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46" style:family="paragraph" style:parent-style-name="tt1cn">
      <style:paragraph-properties fo:margin-top="0.035cm" fo:margin-bottom="0.035cm" style:contextual-spacing="false" style:snap-to-layout-grid="false"/>
      <style:text-properties officeooo:paragraph-rsid="00166715"/>
    </style:style>
    <style:style style:name="P4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66715"/>
    </style:style>
    <style:style style:name="P4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6715" style:font-weight-asian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166715"/>
    </style:style>
    <style:style style:name="P5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6715" style:font-weight-asian="bold"/>
    </style:style>
    <style:style style:name="P5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6715"/>
    </style:style>
    <style:style style:name="P52" style:family="paragraph" style:parent-style-name="Standard">
      <style:paragraph-properties fo:margin-top="0.035cm" fo:margin-bottom="0.212cm" style:contextual-spacing="false"/>
      <style:text-properties officeooo:paragraph-rsid="00166715"/>
    </style:style>
    <style:style style:name="P53" style:family="paragraph" style:parent-style-name="tt1n">
      <style:paragraph-properties fo:margin-top="0.035cm" fo:margin-bottom="0.212cm" style:contextual-spacing="false"/>
      <style:text-properties officeooo:paragraph-rsid="00177850"/>
    </style:style>
    <style:style style:name="P54" style:family="paragraph" style:parent-style-name="tt1cn">
      <style:paragraph-properties fo:margin-top="0.035cm" fo:margin-bottom="0.035cm" style:contextual-spacing="false" style:snap-to-layout-grid="false"/>
      <style:text-properties officeooo:paragraph-rsid="00177850"/>
    </style:style>
    <style:style style:name="P55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77850"/>
    </style:style>
    <style:style style:name="P56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77850" style:font-weight-asian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177850"/>
    </style:style>
    <style:style style:name="P5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77850" style:font-weight-asian="bold"/>
    </style:style>
    <style:style style:name="P5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77850"/>
    </style:style>
    <style:style style:name="P6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62" style:family="paragraph" style:parent-style-name="Standard">
      <style:paragraph-properties fo:margin-left="0cm" fo:margin-right="0cm" fo:text-align="right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63" style:family="paragraph" style:parent-style-name="tt1c">
      <style:paragraph-properties fo:margin-top="0.035cm" fo:margin-bottom="0.035cm" style:contextual-spacing="false" style:snap-to-layout-grid="false"/>
    </style:style>
    <style:style style:name="P64" style:family="paragraph" style:parent-style-name="tt1c">
      <style:paragraph-properties fo:margin-top="0.035cm" fo:margin-bottom="0.035cm" style:contextual-spacing="false"/>
    </style:style>
    <style:style style:name="P65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66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67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68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6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7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2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11c122"/>
    </style:style>
    <style:style style:name="T7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5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5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5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6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6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6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6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6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9" draw:name="Control 5" draw:style-name="gr1" draw:text-style-name="P5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20" draw:name="Control 6" draw:style-name="gr1" draw:text-style-name="P5" svg:width="4.843cm" svg:height="0.722cm" draw:control="control9"/></text:span></text:p>
          </table:table-cell>
          <table:table-cell table:style-name="Tabla1.A2" office:value-type="string">
            <text:p text:style-name="P6">Ano académico <draw:control text:anchor-type="as-char" draw:z-index="21" draw:name="Control 7" draw:style-name="gr1" draw:text-style-name="P5" svg:width="4.262cm" svg:height="0.722cm" draw:control="control10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2" draw:name="Control 8" draw:style-name="gr1" draw:text-style-name="P5" svg:width="1.405cm" svg:height="0.722cm" draw:control="control11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3" draw:name="Control 9" draw:style-name="gr1" draw:text-style-name="P5" svg:width="5.691cm" svg:height="0.722cm" draw:control="control12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4" draw:name="Control 1" draw:style-name="gr1" draw:text-style-name="P5" svg:width="5.038cm" svg:height="0.722cm" draw:control="control13"/></text:span></text:p>
          </table:table-cell>
          <table:table-cell table:style-name="Tabla2.C1" office:value-type="string">
            <text:p text:style-name="P10">DNI/NIE <draw:control text:anchor-type="as-char" draw:z-index="25" draw:name="Control 3" draw:style-name="gr1" draw:text-style-name="P5" svg:width="3.252cm" svg:height="0.722cm" draw:control="control14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text:span text:style-name="T3"><draw:control text:anchor-type="as-char" draw:z-index="14" draw:name="Control 4" draw:style-name="gr1" draw:text-style-name="P5" svg:width="11.501cm" svg:height="0.722cm" draw:control="control3"/></text:span></text:p>
          </table:table-cell>
          <table:table-cell table:style-name="Tabla3.A1" office:value-type="string">
            <text:p text:style-name="P14">Cualificación</text:p>
          </table:table-cell>
          <table:table-cell table:style-name="Tabla3.D1" office:value-type="string">
            <text:p text:style-name="P15"><draw:control text:anchor-type="as-char" draw:z-index="15" draw:name="Control 20" draw:style-name="gr1" draw:text-style-name="P5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17"><draw:control text:anchor-type="as-char" draw:z-index="16" draw:name="Control 28" draw:style-name="gr2" draw:text-style-name="P5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3" office:value-type="string">
            <text:p text:style-name="P17"><draw:control text:anchor-type="as-char" svg:y="-0.79cm" draw:z-index="17" draw:name="Control 28" draw:style-name="gr3" draw:text-style-name="P5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3" office:value-type="string">
            <text:p text:style-name="P17"><draw:control text:anchor-type="as-char" svg:y="-0.79cm" draw:z-index="18" draw:name="Control 14" draw:style-name="gr3" draw:text-style-name="P5" svg:width="14.832cm" svg:height="1.001cm" draw:control="control7"/></text:p>
          </table:table-cell>
          <table:covered-table-cell/>
          <table:covered-table-cell/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Módulo profesional</text:p>
          </table:table-cell>
          <table:table-cell table:style-name="Tabla6.A1" office:value-type="string">
            <text:p text:style-name="P21"><text:span text:style-name="T3"><draw:control text:anchor-type="as-char" draw:z-index="27" draw:name="Control 10" draw:style-name="gr1" draw:text-style-name="P5" svg:width="11.501cm" svg:height="0.722cm" draw:control="control16"/></text:span></text:p>
          </table:table-cell>
          <table:table-cell table:style-name="Tabla6.A1" office:value-type="string">
            <text:p text:style-name="P22">Cualificación</text:p>
          </table:table-cell>
          <table:table-cell table:style-name="Tabla6.D1" office:value-type="string">
            <text:p text:style-name="P23"><draw:control text:anchor-type="as-char" draw:z-index="28" draw:name="Control 13" draw:style-name="gr1" draw:text-style-name="P5" svg:width="0.773cm" svg:height="0.722cm" draw:control="control17"/></text:p>
          </table:table-cell>
        </table:table-row>
        <table:table-row table:style-name="Tabla6.2">
          <table:table-cell table:style-name="Tabla6.A2" office:value-type="string">
            <text:p text:style-name="P20">Valoración da aprendizaxe</text:p>
          </table:table-cell>
          <table:table-cell table:style-name="Tabla6.B2" table:number-columns-spanned="3" office:value-type="string">
            <text:p text:style-name="P24"><draw:control text:anchor-type="as-char" draw:z-index="29" draw:name="Control 15" draw:style-name="gr2" draw:text-style-name="P5" svg:width="14.832cm" svg:height="2.001cm" draw:control="control18"/></text:p>
          </table:table-cell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0">Actividades de recuperación <text:span text:style-name="T5">propostas</text:span></text:p>
          </table:table-cell>
          <table:table-cell table:style-name="Tabla6.B2" table:number-columns-spanned="3" office:value-type="string">
            <text:p text:style-name="P24"><draw:control text:anchor-type="as-char" svg:y="-0.79cm" draw:z-index="30" draw:name="Control 16" draw:style-name="gr3" draw:text-style-name="P5" svg:width="14.832cm" svg:height="2.001cm" draw:control="control19"/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25">Medidas de atención á diversidade adoptadas</text:p>
          </table:table-cell>
          <table:table-cell table:style-name="Tabla6.B2" table:number-columns-spanned="3" office:value-type="string">
            <text:p text:style-name="P24"><draw:control text:anchor-type="as-char" svg:y="-0.79cm" draw:z-index="31" draw:name="Control 19" draw:style-name="gr3" draw:text-style-name="P5" svg:width="14.832cm" svg:height="1.001cm" draw:control="control20"/></text:p>
          </table:table-cell>
          <table:covered-table-cell/>
          <table:covered-table-cell/>
        </table:table-row>
      </table:table>
      <text:p text:style-name="P19"/>
      <text:p text:style-name="P19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6">Módulo profesional</text:p>
          </table:table-cell>
          <table:table-cell table:style-name="Tabla7.A1" office:value-type="string">
            <text:p text:style-name="P27"><text:span text:style-name="T3"><draw:control text:anchor-type="as-char" draw:z-index="32" draw:name="Control 21" draw:style-name="gr1" draw:text-style-name="P5" svg:width="11.501cm" svg:height="0.722cm" draw:control="control21"/></text:span></text:p>
          </table:table-cell>
          <table:table-cell table:style-name="Tabla7.A1" office:value-type="string">
            <text:p text:style-name="P28">Cualificación</text:p>
          </table:table-cell>
          <table:table-cell table:style-name="Tabla7.D1" office:value-type="string">
            <text:p text:style-name="P29"><draw:control text:anchor-type="as-char" draw:z-index="33" draw:name="Control 23" draw:style-name="gr1" draw:text-style-name="P5" svg:width="0.773cm" svg:height="0.722cm" draw:control="control22"/></text:p>
          </table:table-cell>
        </table:table-row>
        <table:table-row table:style-name="Tabla7.2">
          <table:table-cell table:style-name="Tabla7.A2" office:value-type="string">
            <text:p text:style-name="P26">Valoración da aprendizaxe</text:p>
          </table:table-cell>
          <table:table-cell table:style-name="Tabla7.B2" table:number-columns-spanned="3" office:value-type="string">
            <text:p text:style-name="P30"><draw:control text:anchor-type="as-char" draw:z-index="34" draw:name="Control 24" draw:style-name="gr2" draw:text-style-name="P5" svg:width="14.832cm" svg:height="2.001cm" draw:control="control23"/></text:p>
          </table:table-cell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6">Actividades de recuperación <text:span text:style-name="T5">propostas</text:span></text:p>
          </table:table-cell>
          <table:table-cell table:style-name="Tabla7.B2" table:number-columns-spanned="3" office:value-type="string">
            <text:p text:style-name="P30"><draw:control text:anchor-type="as-char" svg:y="-0.79cm" draw:z-index="35" draw:name="Control 25" draw:style-name="gr3" draw:text-style-name="P5" svg:width="14.832cm" svg:height="2.001cm" draw:control="control24"/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1">Medidas de atención á diversidade adoptadas</text:p>
          </table:table-cell>
          <table:table-cell table:style-name="Tabla7.B2" table:number-columns-spanned="3" office:value-type="string">
            <text:p text:style-name="P30"><draw:control text:anchor-type="as-char" svg:y="-0.79cm" draw:z-index="36" draw:name="Control 26" draw:style-name="gr3" draw:text-style-name="P5" svg:width="14.832cm" svg:height="1.001cm" draw:control="control25"/></text:p>
          </table:table-cell>
          <table:covered-table-cell/>
          <table:covered-table-cell/>
        </table:table-row>
      </table:table>
      <text:p text:style-name="P3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3">Módulo profesional</text:p>
          </table:table-cell>
          <table:table-cell table:style-name="Tabla8.A1" office:value-type="string">
            <text:p text:style-name="P34"><text:span text:style-name="T3"><draw:control text:anchor-type="as-char" draw:z-index="37" draw:name="Control 27" draw:style-name="gr1" draw:text-style-name="P5" svg:width="11.501cm" svg:height="0.722cm" draw:control="control26"/></text:span></text:p>
          </table:table-cell>
          <table:table-cell table:style-name="Tabla8.A1" office:value-type="string">
            <text:p text:style-name="P35">Cualificación</text:p>
          </table:table-cell>
          <table:table-cell table:style-name="Tabla8.D1" office:value-type="string">
            <text:p text:style-name="P36"><draw:control text:anchor-type="as-char" draw:z-index="38" draw:name="Control 30" draw:style-name="gr1" draw:text-style-name="P5" svg:width="0.773cm" svg:height="0.722cm" draw:control="control27"/></text:p>
          </table:table-cell>
        </table:table-row>
        <table:table-row table:style-name="Tabla8.2">
          <table:table-cell table:style-name="Tabla8.A2" office:value-type="string">
            <text:p text:style-name="P33">Valoración da aprendizaxe</text:p>
          </table:table-cell>
          <table:table-cell table:style-name="Tabla8.B2" table:number-columns-spanned="3" office:value-type="string">
            <text:p text:style-name="P37"><draw:control text:anchor-type="as-char" draw:z-index="39" draw:name="Control 31" draw:style-name="gr2" draw:text-style-name="P5" svg:width="14.832cm" svg:height="2.001cm" draw:control="control28"/></text:p>
          </table:table-cell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33">Actividades de recuperación <text:span text:style-name="T5">propostas</text:span></text:p>
          </table:table-cell>
          <table:table-cell table:style-name="Tabla8.B2" table:number-columns-spanned="3" office:value-type="string">
            <text:p text:style-name="P37"><draw:control text:anchor-type="as-char" svg:y="-0.79cm" draw:z-index="40" draw:name="Control 32" draw:style-name="gr3" draw:text-style-name="P5" svg:width="14.832cm" svg:height="2.001cm" draw:control="control29"/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38">Medidas de atención á diversidade adoptadas</text:p>
          </table:table-cell>
          <table:table-cell table:style-name="Tabla8.B2" table:number-columns-spanned="3" office:value-type="string">
            <text:p text:style-name="P37"><draw:control text:anchor-type="as-char" svg:y="-0.79cm" draw:z-index="41" draw:name="Control 33" draw:style-name="gr3" draw:text-style-name="P5" svg:width="14.832cm" svg:height="1.001cm" draw:control="control30"/></text:p>
          </table:table-cell>
          <table:covered-table-cell/>
          <table:covered-table-cell/>
        </table:table-row>
      </table:table>
      <text:p text:style-name="P3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0">Módulo profesional</text:p>
          </table:table-cell>
          <table:table-cell table:style-name="Tabla9.A1" office:value-type="string">
            <text:p text:style-name="P41"><text:span text:style-name="T3"><draw:control text:anchor-type="as-char" draw:z-index="42" draw:name="Control 34" draw:style-name="gr1" draw:text-style-name="P5" svg:width="11.501cm" svg:height="0.722cm" draw:control="control31"/></text:span></text:p>
          </table:table-cell>
          <table:table-cell table:style-name="Tabla9.A1" office:value-type="string">
            <text:p text:style-name="P42">Cualificación</text:p>
          </table:table-cell>
          <table:table-cell table:style-name="Tabla9.D1" office:value-type="string">
            <text:p text:style-name="P43"><draw:control text:anchor-type="as-char" draw:z-index="43" draw:name="Control 36" draw:style-name="gr1" draw:text-style-name="P5" svg:width="0.773cm" svg:height="0.722cm" draw:control="control32"/></text:p>
          </table:table-cell>
        </table:table-row>
        <table:table-row table:style-name="Tabla9.2">
          <table:table-cell table:style-name="Tabla9.A2" office:value-type="string">
            <text:p text:style-name="P40">Valoración da aprendizaxe</text:p>
          </table:table-cell>
          <table:table-cell table:style-name="Tabla9.B2" table:number-columns-spanned="3" office:value-type="string">
            <text:p text:style-name="P44"><draw:control text:anchor-type="as-char" draw:z-index="44" draw:name="Control 37" draw:style-name="gr2" draw:text-style-name="P5" svg:width="14.832cm" svg:height="2.001cm" draw:control="control33"/></text:p>
          </table:table-cell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40">Actividades de recuperación <text:span text:style-name="T5">propostas</text:span></text:p>
          </table:table-cell>
          <table:table-cell table:style-name="Tabla9.B2" table:number-columns-spanned="3" office:value-type="string">
            <text:p text:style-name="P44"><draw:control text:anchor-type="as-char" svg:y="-0.79cm" draw:z-index="45" draw:name="Control 38" draw:style-name="gr3" draw:text-style-name="P5" svg:width="14.832cm" svg:height="2.001cm" draw:control="control34"/></text:p>
          </table:table-cell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45">Medidas de atención á diversidade adoptadas</text:p>
          </table:table-cell>
          <table:table-cell table:style-name="Tabla9.B2" table:number-columns-spanned="3" office:value-type="string">
            <text:p text:style-name="P44"><draw:control text:anchor-type="as-char" svg:y="-0.79cm" draw:z-index="46" draw:name="Control 39" draw:style-name="gr3" draw:text-style-name="P5" svg:width="14.832cm" svg:height="1.001cm" draw:control="control35"/></text:p>
          </table:table-cell>
          <table:covered-table-cell/>
          <table:covered-table-cell/>
        </table:table-row>
      </table:table>
      <text:p text:style-name="P39"/>
      <text:p text:style-name="P39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6">Módulo profesional</text:p>
          </table:table-cell>
          <table:table-cell table:style-name="Tabla10.A1" office:value-type="string">
            <text:p text:style-name="P47"><text:span text:style-name="T3"><draw:control text:anchor-type="as-char" draw:z-index="47" draw:name="Control 40" draw:style-name="gr1" draw:text-style-name="P5" svg:width="11.501cm" svg:height="0.722cm" draw:control="control36"/></text:span></text:p>
          </table:table-cell>
          <table:table-cell table:style-name="Tabla10.A1" office:value-type="string">
            <text:p text:style-name="P48">Cualificación</text:p>
          </table:table-cell>
          <table:table-cell table:style-name="Tabla10.D1" office:value-type="string">
            <text:p text:style-name="P49"><draw:control text:anchor-type="as-char" draw:z-index="48" draw:name="Control 42" draw:style-name="gr1" draw:text-style-name="P5" svg:width="0.773cm" svg:height="0.722cm" draw:control="control37"/></text:p>
          </table:table-cell>
        </table:table-row>
        <table:table-row table:style-name="Tabla10.2">
          <table:table-cell table:style-name="Tabla10.A2" office:value-type="string">
            <text:p text:style-name="P46">Valoración da aprendizaxe</text:p>
          </table:table-cell>
          <table:table-cell table:style-name="Tabla10.B2" table:number-columns-spanned="3" office:value-type="string">
            <text:p text:style-name="P50"><draw:control text:anchor-type="as-char" draw:z-index="49" draw:name="Control 43" draw:style-name="gr2" draw:text-style-name="P5" svg:width="14.832cm" svg:height="2.001cm" draw:control="control38"/></text:p>
          </table:table-cell>
          <table:covered-table-cell/>
          <table:covered-table-cell/>
        </table:table-row>
        <table:table-row table:style-name="Tabla10.3">
          <table:table-cell table:style-name="Tabla10.A2" office:value-type="string">
            <text:p text:style-name="P46">Actividades de recuperación <text:span text:style-name="T5">propostas</text:span></text:p>
          </table:table-cell>
          <table:table-cell table:style-name="Tabla10.B2" table:number-columns-spanned="3" office:value-type="string">
            <text:p text:style-name="P50"><draw:control text:anchor-type="as-char" svg:y="-0.79cm" draw:z-index="50" draw:name="Control 44" draw:style-name="gr3" draw:text-style-name="P5" svg:width="14.832cm" svg:height="2.001cm" draw:control="control39"/></text:p>
          </table:table-cell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51">Medidas de atención á diversidade adoptadas</text:p>
          </table:table-cell>
          <table:table-cell table:style-name="Tabla10.B2" table:number-columns-spanned="3" office:value-type="string">
            <text:p text:style-name="P50"><draw:control text:anchor-type="as-char" svg:y="-0.79cm" draw:z-index="51" draw:name="Control 45" draw:style-name="gr3" draw:text-style-name="P5" svg:width="14.832cm" svg:height="1.001cm" draw:control="control40"/></text:p>
          </table:table-cell>
          <table:covered-table-cell/>
          <table:covered-table-cell/>
        </table:table-row>
      </table:table>
      <text:p text:style-name="P52"/>
      <text:p text:style-name="P5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54">Módulo profesional</text:p>
          </table:table-cell>
          <table:table-cell table:style-name="Tabla11.A1" office:value-type="string">
            <text:p text:style-name="P55"><text:span text:style-name="T3"><draw:control text:anchor-type="as-char" draw:z-index="52" draw:name="Control 46" draw:style-name="gr1" draw:text-style-name="P5" svg:width="11.501cm" svg:height="0.722cm" draw:control="control41"/></text:span></text:p>
          </table:table-cell>
          <table:table-cell table:style-name="Tabla11.A1" office:value-type="string">
            <text:p text:style-name="P56">Cualificación</text:p>
          </table:table-cell>
          <table:table-cell table:style-name="Tabla11.D1" office:value-type="string">
            <text:p text:style-name="P57"><draw:control text:anchor-type="as-char" draw:z-index="53" draw:name="Control 48" draw:style-name="gr1" draw:text-style-name="P5" svg:width="0.773cm" svg:height="0.722cm" draw:control="control42"/></text:p>
          </table:table-cell>
        </table:table-row>
        <table:table-row table:style-name="Tabla11.2">
          <table:table-cell table:style-name="Tabla11.A2" office:value-type="string">
            <text:p text:style-name="P54">Valoración da aprendizaxe</text:p>
          </table:table-cell>
          <table:table-cell table:style-name="Tabla11.B2" table:number-columns-spanned="3" office:value-type="string">
            <text:p text:style-name="P58"><draw:control text:anchor-type="as-char" draw:z-index="54" draw:name="Control 49" draw:style-name="gr2" draw:text-style-name="P5" svg:width="14.832cm" svg:height="2.001cm" draw:control="control43"/></text:p>
          </table:table-cell>
          <table:covered-table-cell/>
          <table:covered-table-cell/>
        </table:table-row>
        <table:table-row table:style-name="Tabla11.3">
          <table:table-cell table:style-name="Tabla11.A2" office:value-type="string">
            <text:p text:style-name="P54">Actividades de recuperación <text:span text:style-name="T5">propostas</text:span></text:p>
          </table:table-cell>
          <table:table-cell table:style-name="Tabla11.B2" table:number-columns-spanned="3" office:value-type="string">
            <text:p text:style-name="P58"><draw:control text:anchor-type="as-char" svg:y="-0.79cm" draw:z-index="55" draw:name="Control 50" draw:style-name="gr3" draw:text-style-name="P5" svg:width="14.832cm" svg:height="2.001cm" draw:control="control44"/></text:p>
          </table:table-cell>
          <table:covered-table-cell/>
          <table:covered-table-cell/>
        </table:table-row>
        <table:table-row table:style-name="Tabla11.1">
          <table:table-cell table:style-name="Tabla11.A4" office:value-type="string">
            <text:p text:style-name="P59">Medidas de atención á diversidade adoptadas</text:p>
          </table:table-cell>
          <table:table-cell table:style-name="Tabla11.B2" table:number-columns-spanned="3" office:value-type="string">
            <text:p text:style-name="P58"><draw:control text:anchor-type="as-char" svg:y="-0.79cm" draw:z-index="56" draw:name="Control 51" draw:style-name="gr3" draw:text-style-name="P5" svg:width="14.832cm" svg:height="1.001cm" draw:control="control45"/></text:p>
          </table:table-cell>
          <table:covered-table-cell/>
          <table:covered-table-cell/>
        </table:table-row>
      </table:table>
      <text:p text:style-name="P53"/>
      <text:p text:style-name="P53"><text:span text:style-name="T6">3</text:span>. <text:span text:style-name="T6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0"><draw:control text:anchor-type="as-char" svg:y="-0.138cm" draw:z-index="26" draw:name="Control 2" draw:style-name="gr3" draw:text-style-name="P5" svg:width="17.888cm" svg:height="2.001cm" draw:control="control15"/></text:p>
          </table:table-cell>
        </table:table-row>
      </table:table>
      <text:p text:style-name="P61"/>
      <text:p text:style-name="P61">Marín, <draw:control text:anchor-type="as-char" draw:z-index="12" draw:name="Control 17" draw:style-name="gr1" draw:text-style-name="P5" svg:width="5.315cm" svg:height="0.722cm" draw:control="control1"/></text:p>
      <text:p text:style-name="P6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63">A <text:span text:style-name="T7">D</text:span>irectora</text:p>
            <text:p text:style-name="P64">Asdo.: Alicia Alonso Iglesias</text:p>
          </table:table-cell>
          <table:table-cell table:style-name="Tabla5.A1" office:value-type="string">
            <text:p text:style-name="P65">Selo </text:p>
            <text:p text:style-name="P66">do centro</text:p>
          </table:table-cell>
          <table:table-cell table:style-name="Tabla5.A1" office:value-type="string">
            <text:p text:style-name="P67">Profesor/<text:span text:style-name="T7">a</text:span> <text:span text:style-name="T7">T</text:span>itor/<text:span text:style-name="T7">a</text:span></text:p>
            <text:p text:style-name="P67">Asdo.: <draw:control text:anchor-type="as-char" draw:z-index="13" draw:name="Control 18" draw:style-name="gr1" draw:text-style-name="P5" svg:width="5.315cm" svg:height="0.722cm" draw:control="control2"/></text:p>
            <text:p text:style-name="P68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2"><draw:image xlink:href="Pictures/10000000000001B500000095C4CD9455.png" xlink:type="simple" xlink:show="embed" xlink:actuate="onLoad" draw:mime-type="image/png"/></draw:frame><draw:frame draw:style-name="Mfr2" draw:name="Imagen6" text:anchor-type="char" svg:x="16.2cm" svg:y="0.288cm" svg:width="3.03cm" svg:height="1.713cm" draw:z-index="5"><draw:image xlink:href="Pictures/1000000000000647000004291009193E.png" xlink:type="simple" xlink:show="embed" xlink:actuate="onLoad" draw:mime-type="image/png"/></draw:frame><draw:line text:anchor-type="char" draw:z-index="8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1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3</text:page-number></text:span><text:span text:style-name="MT7"><text:s/>de 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forme Individualizado</dc:title>
    <meta:initial-creator>Xesús Cociña Souto</meta:initial-creator>
    <meta:editing-cycles>81</meta:editing-cycles>
    <meta:editing-duration>PT8H16M4S</meta:editing-duration>
    <meta:generator>LibreOffice/26.2.0.3$Windows_X86_64 LibreOffice_project/620$Build-3</meta:generator>
    <meta:printed-by>Archivos PDF</meta:printed-by>
    <dc:date>2026-06-19T13:50:19.411628000</dc:date>
    <meta:document-statistic meta:table-count="11" meta:image-count="2" meta:object-count="0" meta:page-count="3" meta:paragraph-count="96" meta:word-count="230" meta:character-count="1743" meta:non-whitespace-character-count="1557"/>
  </office:meta>
</office:document-meta>
</file>