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11.906cm"/>
    </style:style>
    <style:style style:name="Tabla7.C" style:family="table-column">
      <style:table-column-properties style:column-width="1.984cm"/>
    </style:style>
    <style:style style:name="Tabla7.D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11.906cm"/>
    </style:style>
    <style:style style:name="Tabla8.C" style:family="table-column">
      <style:table-column-properties style:column-width="1.984cm"/>
    </style:style>
    <style:style style:name="Tabla8.D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11.906cm"/>
    </style:style>
    <style:style style:name="Tabla9.C" style:family="table-column">
      <style:table-column-properties style:column-width="1.984cm"/>
    </style:style>
    <style:style style:name="Tabla9.D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11.906cm"/>
    </style:style>
    <style:style style:name="Tabla10.C" style:family="table-column">
      <style:table-column-properties style:column-width="1.984cm"/>
    </style:style>
    <style:style style:name="Tabla10.D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23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24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2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6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7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8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3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7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3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tt1n">
      <style:paragraph-properties fo:margin-top="0.035cm" fo:margin-bottom="0.212cm" style:contextual-spacing="false"/>
    </style:style>
    <style:style style:name="P43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4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47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4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4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5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51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54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56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59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60" style:family="paragraph" style:parent-style-name="tt1c">
      <style:paragraph-properties fo:margin-top="0.035cm" fo:margin-bottom="0.035cm" style:contextual-spacing="false"/>
    </style:style>
    <style:style style:name="P6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6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6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6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6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2" style:font-size-complex="7pt"/>
    </style:style>
    <style:style style:name="P6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2" style:font-size-complex="7pt"/>
    </style:style>
    <style:style style:name="P6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2" style:font-size-complex="7pt"/>
    </style:style>
    <style:style style:name="P6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2" style:font-size-complex="7pt"/>
    </style:style>
    <style:style style:name="P6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6715" style:font-size-asian="7pt" style:font-name-complex="Arial2" style:font-size-complex="7pt"/>
    </style:style>
    <style:style style:name="P7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11c122"/>
    </style:style>
    <style:style style:name="T14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19" draw:name="Control 5" draw:style-name="gr3" draw:text-style-name="P70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20" draw:name="Control 6" draw:style-name="gr3" draw:text-style-name="P70" svg:width="4.843cm" svg:height="0.722cm" draw:control="control9"/></text:span></text:p>
          </table:table-cell>
          <table:table-cell table:style-name="Tabla1.A2" office:value-type="string">
            <text:p text:style-name="P27">Ano académico <draw:control text:anchor-type="as-char" draw:z-index="21" draw:name="Control 7" draw:style-name="gr3" draw:text-style-name="P70" svg:width="4.262cm" svg:height="0.722cm" draw:control="control10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22" draw:name="Control 8" draw:style-name="gr3" draw:text-style-name="P70" svg:width="1.405cm" svg:height="0.722cm" draw:control="control11"/></text:span></text:p>
          </table:table-cell>
        </table:table-row>
      </table:table>
      <text:p text:style-name="P41"/>
      <text:p text:style-name="P42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23" draw:name="Control 9" draw:style-name="gr3" draw:text-style-name="P70" svg:width="5.691cm" svg:height="0.722cm" draw:control="control12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24" draw:name="Control 1" draw:style-name="gr3" draw:text-style-name="P70" svg:width="5.038cm" svg:height="0.722cm" draw:control="control13"/></text:span></text:p>
          </table:table-cell>
          <table:table-cell table:style-name="Tabla2.C1" office:value-type="string">
            <text:p text:style-name="P28">DNI/NIE <draw:control text:anchor-type="as-char" draw:z-index="25" draw:name="Control 3" draw:style-name="gr3" draw:text-style-name="P70" svg:width="3.252cm" svg:height="0.722cm" draw:control="control14"/></text:p>
          </table:table-cell>
        </table:table-row>
      </table:table>
      <text:p text:style-name="P41"/>
      <text:p text:style-name="P43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64"><draw:control text:anchor-type="as-char" draw:z-index="14" draw:name="Control 4" draw:style-name="gr3" draw:text-style-name="P70" svg:width="11.501cm" svg:height="0.722cm" draw:control="control3"/></text:p>
          </table:table-cell>
          <table:table-cell table:style-name="Tabla3.A1" office:value-type="string">
            <text:p text:style-name="P29">Cualificación</text:p>
          </table:table-cell>
          <table:table-cell table:style-name="Tabla3.D1" office:value-type="string">
            <text:p text:style-name="P44"><draw:control text:anchor-type="as-char" draw:z-index="15" draw:name="Control 20" draw:style-name="gr3" draw:text-style-name="P70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30"><draw:control text:anchor-type="as-char" draw:z-index="16" draw:name="Control 28" draw:style-name="gr2" draw:text-style-name="P70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3" office:value-type="string">
            <text:p text:style-name="P30"><draw:control text:anchor-type="as-char" svg:y="-0.79cm" draw:z-index="17" draw:name="Control 28" draw:style-name="gr1" draw:text-style-name="P70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45">Medidas de atención á diversidade adoptadas</text:p>
          </table:table-cell>
          <table:table-cell table:style-name="Tabla3.B2" table:number-columns-spanned="3" office:value-type="string">
            <text:p text:style-name="P30"><draw:control text:anchor-type="as-char" svg:y="-0.79cm" draw:z-index="18" draw:name="Control 14" draw:style-name="gr1" draw:text-style-name="P70" svg:width="14.832cm" svg:height="1.001cm" draw:control="control7"/></text:p>
          </table:table-cell>
          <table:covered-table-cell/>
          <table:covered-table-cell/>
        </table:table-row>
      </table:table>
      <text:p text:style-name="P51"/>
      <text:p text:style-name="P5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65"><draw:control text:anchor-type="as-char" draw:z-index="27" draw:name="Control 10" draw:style-name="gr3" draw:text-style-name="P70" svg:width="11.501cm" svg:height="0.722cm" draw:control="control16"/></text:p>
          </table:table-cell>
          <table:table-cell table:style-name="Tabla6.A1" office:value-type="string">
            <text:p text:style-name="P31">Cualificación</text:p>
          </table:table-cell>
          <table:table-cell table:style-name="Tabla6.D1" office:value-type="string">
            <text:p text:style-name="P52"><draw:control text:anchor-type="as-char" draw:z-index="28" draw:name="Control 13" draw:style-name="gr3" draw:text-style-name="P70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32"><draw:control text:anchor-type="as-char" draw:z-index="29" draw:name="Control 15" draw:style-name="gr2" draw:text-style-name="P70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12">propostas</text:span></text:p>
          </table:table-cell>
          <table:table-cell table:style-name="Tabla6.B2" table:number-columns-spanned="3" office:value-type="string">
            <text:p text:style-name="P32"><draw:control text:anchor-type="as-char" svg:y="-0.79cm" draw:z-index="30" draw:name="Control 16" draw:style-name="gr1" draw:text-style-name="P70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6">Medidas de atención á diversidade adoptadas</text:p>
          </table:table-cell>
          <table:table-cell table:style-name="Tabla6.B2" table:number-columns-spanned="3" office:value-type="string">
            <text:p text:style-name="P32"><draw:control text:anchor-type="as-char" svg:y="-0.79cm" draw:z-index="31" draw:name="Control 19" draw:style-name="gr1" draw:text-style-name="P70" svg:width="14.832cm" svg:height="1.001cm" draw:control="control20"/></text:p>
          </table:table-cell>
          <table:covered-table-cell/>
          <table:covered-table-cell/>
        </table:table-row>
      </table:table>
      <text:p text:style-name="P51"/>
      <text:p text:style-name="P51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1">Módulo profesional</text:p>
          </table:table-cell>
          <table:table-cell table:style-name="Tabla7.A1" office:value-type="string">
            <text:p text:style-name="P66"><draw:control text:anchor-type="as-char" draw:z-index="32" draw:name="Control 21" draw:style-name="gr3" draw:text-style-name="P70" svg:width="11.501cm" svg:height="0.722cm" draw:control="control21"/></text:p>
          </table:table-cell>
          <table:table-cell table:style-name="Tabla7.A1" office:value-type="string">
            <text:p text:style-name="P33">Cualificación</text:p>
          </table:table-cell>
          <table:table-cell table:style-name="Tabla7.D1" office:value-type="string">
            <text:p text:style-name="P53"><draw:control text:anchor-type="as-char" draw:z-index="33" draw:name="Control 23" draw:style-name="gr3" draw:text-style-name="P70" svg:width="0.773cm" svg:height="0.722cm" draw:control="control22"/></text:p>
          </table:table-cell>
        </table:table-row>
        <table:table-row table:style-name="Tabla7.2">
          <table:table-cell table:style-name="Tabla7.A2" office:value-type="string">
            <text:p text:style-name="P21">Valoración da aprendizaxe</text:p>
          </table:table-cell>
          <table:table-cell table:style-name="Tabla7.B2" table:number-columns-spanned="3" office:value-type="string">
            <text:p text:style-name="P34"><draw:control text:anchor-type="as-char" draw:z-index="34" draw:name="Control 24" draw:style-name="gr2" draw:text-style-name="P70" svg:width="14.832cm" svg:height="2.001cm" draw:control="control23"/></text:p>
          </table:table-cell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1">Actividades de recuperación <text:span text:style-name="T12">propostas</text:span></text:p>
          </table:table-cell>
          <table:table-cell table:style-name="Tabla7.B2" table:number-columns-spanned="3" office:value-type="string">
            <text:p text:style-name="P34"><draw:control text:anchor-type="as-char" svg:y="-0.79cm" draw:z-index="35" draw:name="Control 25" draw:style-name="gr1" draw:text-style-name="P70" svg:width="14.832cm" svg:height="2.001cm" draw:control="control24"/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47">Medidas de atención á diversidade adoptadas</text:p>
          </table:table-cell>
          <table:table-cell table:style-name="Tabla7.B2" table:number-columns-spanned="3" office:value-type="string">
            <text:p text:style-name="P34"><draw:control text:anchor-type="as-char" svg:y="-0.79cm" draw:z-index="36" draw:name="Control 26" draw:style-name="gr1" draw:text-style-name="P70" svg:width="14.832cm" svg:height="1.001cm" draw:control="control25"/></text:p>
          </table:table-cell>
          <table:covered-table-cell/>
          <table:covered-table-cell/>
        </table:table-row>
      </table:table>
      <text:p text:style-name="P5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2">Módulo profesional</text:p>
          </table:table-cell>
          <table:table-cell table:style-name="Tabla8.A1" office:value-type="string">
            <text:p text:style-name="P67"><draw:control text:anchor-type="as-char" draw:z-index="37" draw:name="Control 27" draw:style-name="gr3" draw:text-style-name="P70" svg:width="11.501cm" svg:height="0.722cm" draw:control="control26"/></text:p>
          </table:table-cell>
          <table:table-cell table:style-name="Tabla8.A1" office:value-type="string">
            <text:p text:style-name="P35">Cualificación</text:p>
          </table:table-cell>
          <table:table-cell table:style-name="Tabla8.D1" office:value-type="string">
            <text:p text:style-name="P55"><draw:control text:anchor-type="as-char" draw:z-index="38" draw:name="Control 30" draw:style-name="gr3" draw:text-style-name="P70" svg:width="0.773cm" svg:height="0.722cm" draw:control="control27"/></text:p>
          </table:table-cell>
        </table:table-row>
        <table:table-row table:style-name="Tabla8.2">
          <table:table-cell table:style-name="Tabla8.A2" office:value-type="string">
            <text:p text:style-name="P22">Valoración da aprendizaxe</text:p>
          </table:table-cell>
          <table:table-cell table:style-name="Tabla8.B2" table:number-columns-spanned="3" office:value-type="string">
            <text:p text:style-name="P36"><draw:control text:anchor-type="as-char" draw:z-index="39" draw:name="Control 31" draw:style-name="gr2" draw:text-style-name="P70" svg:width="14.832cm" svg:height="2.001cm" draw:control="control28"/></text:p>
          </table:table-cell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22">Actividades de recuperación <text:span text:style-name="T12">propostas</text:span></text:p>
          </table:table-cell>
          <table:table-cell table:style-name="Tabla8.B2" table:number-columns-spanned="3" office:value-type="string">
            <text:p text:style-name="P36"><draw:control text:anchor-type="as-char" svg:y="-0.79cm" draw:z-index="40" draw:name="Control 32" draw:style-name="gr1" draw:text-style-name="P70" svg:width="14.832cm" svg:height="2.001cm" draw:control="control29"/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48">Medidas de atención á diversidade adoptadas</text:p>
          </table:table-cell>
          <table:table-cell table:style-name="Tabla8.B2" table:number-columns-spanned="3" office:value-type="string">
            <text:p text:style-name="P36"><draw:control text:anchor-type="as-char" svg:y="-0.79cm" draw:z-index="41" draw:name="Control 33" draw:style-name="gr1" draw:text-style-name="P70" svg:width="14.832cm" svg:height="1.001cm" draw:control="control30"/></text:p>
          </table:table-cell>
          <table:covered-table-cell/>
          <table:covered-table-cell/>
        </table:table-row>
      </table:table>
      <text:p text:style-name="P5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3">Módulo profesional</text:p>
          </table:table-cell>
          <table:table-cell table:style-name="Tabla9.A1" office:value-type="string">
            <text:p text:style-name="P68"><draw:control text:anchor-type="as-char" draw:z-index="42" draw:name="Control 34" draw:style-name="gr3" draw:text-style-name="P70" svg:width="11.501cm" svg:height="0.722cm" draw:control="control31"/></text:p>
          </table:table-cell>
          <table:table-cell table:style-name="Tabla9.A1" office:value-type="string">
            <text:p text:style-name="P37">Cualificación</text:p>
          </table:table-cell>
          <table:table-cell table:style-name="Tabla9.D1" office:value-type="string">
            <text:p text:style-name="P57"><draw:control text:anchor-type="as-char" draw:z-index="43" draw:name="Control 36" draw:style-name="gr3" draw:text-style-name="P70" svg:width="0.773cm" svg:height="0.722cm" draw:control="control32"/></text:p>
          </table:table-cell>
        </table:table-row>
        <table:table-row table:style-name="Tabla9.2">
          <table:table-cell table:style-name="Tabla9.A2" office:value-type="string">
            <text:p text:style-name="P23">Valoración da aprendizaxe</text:p>
          </table:table-cell>
          <table:table-cell table:style-name="Tabla9.B2" table:number-columns-spanned="3" office:value-type="string">
            <text:p text:style-name="P38"><draw:control text:anchor-type="as-char" draw:z-index="44" draw:name="Control 37" draw:style-name="gr2" draw:text-style-name="P70" svg:width="14.832cm" svg:height="2.001cm" draw:control="control33"/></text:p>
          </table:table-cell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23">Actividades de recuperación <text:span text:style-name="T12">propostas</text:span></text:p>
          </table:table-cell>
          <table:table-cell table:style-name="Tabla9.B2" table:number-columns-spanned="3" office:value-type="string">
            <text:p text:style-name="P38"><draw:control text:anchor-type="as-char" svg:y="-0.79cm" draw:z-index="45" draw:name="Control 38" draw:style-name="gr1" draw:text-style-name="P70" svg:width="14.832cm" svg:height="2.001cm" draw:control="control34"/></text:p>
          </table:table-cell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49">Medidas de atención á diversidade adoptadas</text:p>
          </table:table-cell>
          <table:table-cell table:style-name="Tabla9.B2" table:number-columns-spanned="3" office:value-type="string">
            <text:p text:style-name="P38"><draw:control text:anchor-type="as-char" svg:y="-0.79cm" draw:z-index="46" draw:name="Control 39" draw:style-name="gr1" draw:text-style-name="P70" svg:width="14.832cm" svg:height="1.001cm" draw:control="control35"/></text:p>
          </table:table-cell>
          <table:covered-table-cell/>
          <table:covered-table-cell/>
        </table:table-row>
      </table:table>
      <text:p text:style-name="P56"/>
      <text:p text:style-name="P56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4">Módulo profesional</text:p>
          </table:table-cell>
          <table:table-cell table:style-name="Tabla10.A1" office:value-type="string">
            <text:p text:style-name="P69"><draw:control text:anchor-type="as-char" draw:z-index="47" draw:name="Control 40" draw:style-name="gr3" draw:text-style-name="P70" svg:width="11.501cm" svg:height="0.722cm" draw:control="control36"/></text:p>
          </table:table-cell>
          <table:table-cell table:style-name="Tabla10.A1" office:value-type="string">
            <text:p text:style-name="P39">Cualificación</text:p>
          </table:table-cell>
          <table:table-cell table:style-name="Tabla10.D1" office:value-type="string">
            <text:p text:style-name="P58"><draw:control text:anchor-type="as-char" draw:z-index="48" draw:name="Control 42" draw:style-name="gr3" draw:text-style-name="P70" svg:width="0.773cm" svg:height="0.722cm" draw:control="control37"/></text:p>
          </table:table-cell>
        </table:table-row>
        <table:table-row table:style-name="Tabla10.2">
          <table:table-cell table:style-name="Tabla10.A2" office:value-type="string">
            <text:p text:style-name="P24">Valoración da aprendizaxe</text:p>
          </table:table-cell>
          <table:table-cell table:style-name="Tabla10.B2" table:number-columns-spanned="3" office:value-type="string">
            <text:p text:style-name="P40"><draw:control text:anchor-type="as-char" draw:z-index="49" draw:name="Control 43" draw:style-name="gr2" draw:text-style-name="P70" svg:width="14.832cm" svg:height="2.001cm" draw:control="control38"/></text:p>
          </table:table-cell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24">Actividades de recuperación <text:span text:style-name="T12">propostas</text:span></text:p>
          </table:table-cell>
          <table:table-cell table:style-name="Tabla10.B2" table:number-columns-spanned="3" office:value-type="string">
            <text:p text:style-name="P40"><draw:control text:anchor-type="as-char" svg:y="-0.79cm" draw:z-index="50" draw:name="Control 44" draw:style-name="gr1" draw:text-style-name="P70" svg:width="14.832cm" svg:height="2.001cm" draw:control="control39"/></text:p>
          </table:table-cell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50">Medidas de atención á diversidade adoptadas</text:p>
          </table:table-cell>
          <table:table-cell table:style-name="Tabla10.B2" table:number-columns-spanned="3" office:value-type="string">
            <text:p text:style-name="P40"><draw:control text:anchor-type="as-char" svg:y="-0.79cm" draw:z-index="51" draw:name="Control 45" draw:style-name="gr1" draw:text-style-name="P70" svg:width="14.832cm" svg:height="1.001cm" draw:control="control40"/></text:p>
          </table:table-cell>
          <table:covered-table-cell/>
          <table:covered-table-cell/>
        </table:table-row>
      </table:table>
      <text:p text:style-name="P59"/>
      <text:p text:style-name="P56"><text:span text:style-name="T13">3</text:span>. <text:span text:style-name="T13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5"><draw:control text:anchor-type="as-char" svg:y="-0.138cm" draw:z-index="26" draw:name="Control 2" draw:style-name="gr1" draw:text-style-name="P70" svg:width="17.888cm" svg:height="2.001cm" draw:control="control15"/></text:p>
          </table:table-cell>
        </table:table-row>
      </table:table>
      <text:p text:style-name="P13"/>
      <text:p text:style-name="P13">Marín, <draw:control text:anchor-type="as-char" draw:z-index="12" draw:name="Control 17" draw:style-name="gr3" draw:text-style-name="P70" svg:width="5.315cm" svg:height="0.722cm" draw:control="control1"/></text:p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4">D</text:span>irectora</text:p>
            <text:p text:style-name="P60">Asdo.: Alicia Alonso Iglesias</text:p>
          </table:table-cell>
          <table:table-cell table:style-name="Tabla5.A1" office:value-type="string">
            <text:p text:style-name="P61">Selo </text:p>
            <text:p text:style-name="P62">do centro</text:p>
          </table:table-cell>
          <table:table-cell table:style-name="Tabla5.A1" office:value-type="string">
            <text:p text:style-name="P26">Profesor/<text:span text:style-name="T14">a</text:span> <text:span text:style-name="T14">T</text:span>itor/<text:span text:style-name="T14">a</text:span></text:p>
            <text:p text:style-name="P26">Asdo.: <draw:control text:anchor-type="as-char" draw:z-index="13" draw:name="Control 18" draw:style-name="gr3" draw:text-style-name="P70" svg:width="5.315cm" svg:height="0.722cm" draw:control="control2"/></text:p>
            <text:p text:style-name="P63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2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line text:anchor-type="char" draw:z-index="8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1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3</text:page-number></text:span><text:span text:style-name="MT7"><text:s/>de 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80</meta:editing-cycles>
    <meta:editing-duration>PT8H9M42S</meta:editing-duration>
    <meta:generator>LibreOffice/7.3.3.2$Windows_X86_64 LibreOffice_project/d1d0ea68f081ee2800a922cac8f79445e4603348</meta:generator>
    <meta:printed-by>Archivos PDF</meta:printed-by>
    <dc:date>2026-06-19T13:45:47.261951700</dc:date>
    <meta:document-statistic meta:table-count="10" meta:image-count="2" meta:object-count="0" meta:page-count="3" meta:paragraph-count="86" meta:word-count="214" meta:character-count="1607" meta:non-whitespace-character-count="1432"/>
  </office:meta>
</office:document-meta>
</file>