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11.906cm"/>
    </style:style>
    <style:style style:name="Tabla3.C" style:family="table-column">
      <style:table-column-properties style:column-width="1.984cm"/>
    </style:style>
    <style:style style:name="Tabla3.D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11.906cm"/>
    </style:style>
    <style:style style:name="Tabla6.C" style:family="table-column">
      <style:table-column-properties style:column-width="1.984cm"/>
    </style:style>
    <style:style style:name="Tabla6.D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11.906cm"/>
    </style:style>
    <style:style style:name="Tabla7.C" style:family="table-column">
      <style:table-column-properties style:column-width="1.984cm"/>
    </style:style>
    <style:style style:name="Tabla7.D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08b503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7b0e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2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27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dd99"/>
    </style:style>
    <style:style style:name="P2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3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3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35" style:family="paragraph" style:parent-style-name="Standard">
      <style:paragraph-properties fo:margin-left="0cm" fo:margin-right="0cm" fo:text-align="right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36" style:family="paragraph" style:parent-style-name="tt1c">
      <style:paragraph-properties fo:margin-top="0.035cm" fo:margin-bottom="0.035cm" style:contextual-spacing="false" style:snap-to-layout-grid="false"/>
    </style:style>
    <style:style style:name="P37" style:family="paragraph" style:parent-style-name="tt1c">
      <style:paragraph-properties fo:margin-top="0.035cm" fo:margin-bottom="0.035cm" style:contextual-spacing="false"/>
    </style:style>
    <style:style style:name="P38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9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4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41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42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4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2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11c122"/>
    </style:style>
    <style:style style:name="T7" style:family="text">
      <style:text-properties officeooo:rsid="0007407c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5" draw:name="Control 5" draw:style-name="gr1" draw:text-style-name="P5" svg:width="15.564cm" svg:height="0.722cm" draw:control="control8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16" draw:name="Control 6" draw:style-name="gr1" draw:text-style-name="P5" svg:width="4.843cm" svg:height="0.722cm" draw:control="control9"/></text:span></text:p>
          </table:table-cell>
          <table:table-cell table:style-name="Tabla1.A2" office:value-type="string">
            <text:p text:style-name="P6">Ano académico <draw:control text:anchor-type="as-char" draw:z-index="17" draw:name="Control 7" draw:style-name="gr1" draw:text-style-name="P5" svg:width="4.262cm" svg:height="0.722cm" draw:control="control10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18" draw:name="Control 8" draw:style-name="gr1" draw:text-style-name="P5" svg:width="1.405cm" svg:height="0.722cm" draw:control="control11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19" draw:name="Control 9" draw:style-name="gr1" draw:text-style-name="P5" svg:width="5.691cm" svg:height="0.722cm" draw:control="control12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0" draw:name="Control 1" draw:style-name="gr1" draw:text-style-name="P5" svg:width="5.038cm" svg:height="0.722cm" draw:control="control13"/></text:span></text:p>
          </table:table-cell>
          <table:table-cell table:style-name="Tabla2.C1" office:value-type="string">
            <text:p text:style-name="P10">DNI/NIE <draw:control text:anchor-type="as-char" draw:z-index="21" draw:name="Control 3" draw:style-name="gr1" draw:text-style-name="P5" svg:width="3.252cm" svg:height="0.722cm" draw:control="control14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text:span text:style-name="T3"><draw:control text:anchor-type="as-char" draw:z-index="10" draw:name="Control 4" draw:style-name="gr1" draw:text-style-name="P5" svg:width="11.501cm" svg:height="0.722cm" draw:control="control3"/></text:span></text:p>
          </table:table-cell>
          <table:table-cell table:style-name="Tabla3.A1" office:value-type="string">
            <text:p text:style-name="P14">Cualificación</text:p>
          </table:table-cell>
          <table:table-cell table:style-name="Tabla3.D1" office:value-type="string">
            <text:p text:style-name="P15"><draw:control text:anchor-type="as-char" draw:z-index="11" draw:name="Control 20" draw:style-name="gr1" draw:text-style-name="P5" svg:width="0.773cm" svg:height="0.722cm" draw:control="control4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3" office:value-type="string">
            <text:p text:style-name="P17"><draw:control text:anchor-type="as-char" draw:z-index="12" draw:name="Control 28" draw:style-name="gr2" draw:text-style-name="P5" svg:width="14.832cm" svg:height="2.001cm" draw:control="control5"/></text:p>
          </table:table-cell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3" office:value-type="string">
            <text:p text:style-name="P17"><draw:control text:anchor-type="as-char" svg:y="-0.79cm" draw:z-index="13" draw:name="Control 28" draw:style-name="gr3" draw:text-style-name="P5" svg:width="14.832cm" svg:height="2.001cm" draw:control="control6"/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3" office:value-type="string">
            <text:p text:style-name="P17"><draw:control text:anchor-type="as-char" svg:y="-0.79cm" draw:z-index="14" draw:name="Control 14" draw:style-name="gr3" draw:text-style-name="P5" svg:width="14.832cm" svg:height="1.001cm" draw:control="control7"/></text:p>
          </table:table-cell>
          <table:covered-table-cell/>
          <table:covered-table-cell/>
        </table:table-row>
      </table:table>
      <text:p text:style-name="P19"/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Módulo profesional</text:p>
          </table:table-cell>
          <table:table-cell table:style-name="Tabla6.A1" office:value-type="string">
            <text:p text:style-name="P21"><text:span text:style-name="T3"><draw:control text:anchor-type="as-char" draw:z-index="23" draw:name="Control 10" draw:style-name="gr1" draw:text-style-name="P5" svg:width="11.501cm" svg:height="0.722cm" draw:control="control16"/></text:span></text:p>
          </table:table-cell>
          <table:table-cell table:style-name="Tabla6.A1" office:value-type="string">
            <text:p text:style-name="P22">Cualificación</text:p>
          </table:table-cell>
          <table:table-cell table:style-name="Tabla6.D1" office:value-type="string">
            <text:p text:style-name="P23"><draw:control text:anchor-type="as-char" draw:z-index="24" draw:name="Control 13" draw:style-name="gr1" draw:text-style-name="P5" svg:width="0.773cm" svg:height="0.722cm" draw:control="control17"/></text:p>
          </table:table-cell>
        </table:table-row>
        <table:table-row table:style-name="Tabla6.2">
          <table:table-cell table:style-name="Tabla6.A2" office:value-type="string">
            <text:p text:style-name="P20">Valoración da aprendizaxe</text:p>
          </table:table-cell>
          <table:table-cell table:style-name="Tabla6.B2" table:number-columns-spanned="3" office:value-type="string">
            <text:p text:style-name="P24"><draw:control text:anchor-type="as-char" draw:z-index="25" draw:name="Control 15" draw:style-name="gr2" draw:text-style-name="P5" svg:width="14.832cm" svg:height="2.001cm" draw:control="control18"/></text:p>
          </table:table-cell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0">Actividades de recuperación <text:span text:style-name="T5">propostas</text:span></text:p>
          </table:table-cell>
          <table:table-cell table:style-name="Tabla6.B2" table:number-columns-spanned="3" office:value-type="string">
            <text:p text:style-name="P24"><draw:control text:anchor-type="as-char" svg:y="-0.79cm" draw:z-index="26" draw:name="Control 16" draw:style-name="gr3" draw:text-style-name="P5" svg:width="14.832cm" svg:height="2.001cm" draw:control="control19"/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25">Medidas de atención á diversidade adoptadas</text:p>
          </table:table-cell>
          <table:table-cell table:style-name="Tabla6.B2" table:number-columns-spanned="3" office:value-type="string">
            <text:p text:style-name="P24"><draw:control text:anchor-type="as-char" svg:y="-0.79cm" draw:z-index="27" draw:name="Control 19" draw:style-name="gr3" draw:text-style-name="P5" svg:width="14.832cm" svg:height="1.001cm" draw:control="control20"/></text:p>
          </table:table-cell>
          <table:covered-table-cell/>
          <table:covered-table-cell/>
        </table:table-row>
      </table:table>
      <text:p text:style-name="P19"/>
      <text:p text:style-name="P19"><text:soft-page-break/></text:p>
      <text:p text:style-name="P2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7">Módulo profesional</text:p>
          </table:table-cell>
          <table:table-cell table:style-name="Tabla7.A1" office:value-type="string">
            <text:p text:style-name="P28"><text:span text:style-name="T3"><draw:control text:anchor-type="as-char" draw:z-index="28" draw:name="Control 21" draw:style-name="gr1" draw:text-style-name="P5" svg:width="11.501cm" svg:height="0.722cm" draw:control="control21"/></text:span></text:p>
          </table:table-cell>
          <table:table-cell table:style-name="Tabla7.A1" office:value-type="string">
            <text:p text:style-name="P29">Cualificación</text:p>
          </table:table-cell>
          <table:table-cell table:style-name="Tabla7.D1" office:value-type="string">
            <text:p text:style-name="P30"><draw:control text:anchor-type="as-char" draw:z-index="29" draw:name="Control 23" draw:style-name="gr1" draw:text-style-name="P5" svg:width="0.773cm" svg:height="0.722cm" draw:control="control22"/></text:p>
          </table:table-cell>
        </table:table-row>
        <table:table-row table:style-name="Tabla7.2">
          <table:table-cell table:style-name="Tabla7.A2" office:value-type="string">
            <text:p text:style-name="P27">Valoración da aprendizaxe</text:p>
          </table:table-cell>
          <table:table-cell table:style-name="Tabla7.B2" table:number-columns-spanned="3" office:value-type="string">
            <text:p text:style-name="P31"><draw:control text:anchor-type="as-char" draw:z-index="30" draw:name="Control 24" draw:style-name="gr2" draw:text-style-name="P5" svg:width="14.832cm" svg:height="2.001cm" draw:control="control23"/></text:p>
          </table:table-cell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7">Actividades de recuperación <text:span text:style-name="T5">propostas</text:span></text:p>
          </table:table-cell>
          <table:table-cell table:style-name="Tabla7.B2" table:number-columns-spanned="3" office:value-type="string">
            <text:p text:style-name="P31"><draw:control text:anchor-type="as-char" svg:y="-0.79cm" draw:z-index="31" draw:name="Control 25" draw:style-name="gr3" draw:text-style-name="P5" svg:width="14.832cm" svg:height="2.001cm" draw:control="control24"/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32">Medidas de atención á diversidade adoptadas</text:p>
          </table:table-cell>
          <table:table-cell table:style-name="Tabla7.B2" table:number-columns-spanned="3" office:value-type="string">
            <text:p text:style-name="P31"><draw:control text:anchor-type="as-char" svg:y="-0.79cm" draw:z-index="32" draw:name="Control 26" draw:style-name="gr3" draw:text-style-name="P5" svg:width="14.832cm" svg:height="1.001cm" draw:control="control25"/></text:p>
          </table:table-cell>
          <table:covered-table-cell/>
          <table:covered-table-cell/>
        </table:table-row>
      </table:table>
      <text:p text:style-name="P26"/>
      <text:p text:style-name="P26"><text:span text:style-name="T6">3</text:span>. <text:span text:style-name="T6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3"><draw:control text:anchor-type="as-char" svg:y="-0.138cm" draw:z-index="22" draw:name="Control 2" draw:style-name="gr3" draw:text-style-name="P5" svg:width="17.888cm" svg:height="2.001cm" draw:control="control15"/></text:p>
          </table:table-cell>
        </table:table-row>
      </table:table>
      <text:p text:style-name="P34"/>
      <text:p text:style-name="P34">Marín, <draw:control text:anchor-type="as-char" draw:z-index="8" draw:name="Control 17" draw:style-name="gr1" draw:text-style-name="P5" svg:width="5.315cm" svg:height="0.722cm" draw:control="control1"/></text:p>
      <text:p text:style-name="P3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6">A <text:span text:style-name="T7">D</text:span>irectora</text:p>
            <text:p text:style-name="P37">Asdo.: Alicia Alonso Iglesias</text:p>
          </table:table-cell>
          <table:table-cell table:style-name="Tabla5.A1" office:value-type="string">
            <text:p text:style-name="P38">Selo </text:p>
            <text:p text:style-name="P39">do centro</text:p>
          </table:table-cell>
          <table:table-cell table:style-name="Tabla5.A1" office:value-type="string">
            <text:p text:style-name="P40">Profesor/<text:span text:style-name="T7">a</text:span> <text:span text:style-name="T7">T</text:span>itor/<text:span text:style-name="T7">a</text:span></text:p>
            <text:p text:style-name="P40">Asdo.: <draw:control text:anchor-type="as-char" draw:z-index="9" draw:name="Control 18" draw:style-name="gr1" draw:text-style-name="P5" svg:width="5.315cm" svg:height="0.722cm" draw:control="control2"/></text:p>
            <text:p text:style-name="P41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1"><draw:image xlink:href="Pictures/10000000000001B500000095C4CD9455.png" xlink:type="simple" xlink:show="embed" xlink:actuate="onLoad" draw:mime-type="image/png"/></draw:frame><draw:frame draw:style-name="Mfr2" draw:name="Imagen6" text:anchor-type="char" svg:x="16.2cm" svg:y="0.288cm" svg:width="3.03cm" svg:height="1.713cm" draw:z-index="3"><draw:image xlink:href="Pictures/1000000000000647000004291009193E.png" xlink:type="simple" xlink:show="embed" xlink:actuate="onLoad" draw:mime-type="image/png"/></draw:frame><draw:line text:anchor-type="char" draw:z-index="5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7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2</text:page-number></text:span><text:span text:style-name="MT7"><text:s/>de </text:span><text:span text:style-name="MT7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nforme Individualizado</dc:title>
    <meta:initial-creator>Xesús Cociña Souto</meta:initial-creator>
    <meta:editing-cycles>76</meta:editing-cycles>
    <meta:editing-duration>PT8H20M35S</meta:editing-duration>
    <meta:generator>LibreOffice/26.2.0.3$Windows_X86_64 LibreOffice_project/620$Build-3</meta:generator>
    <meta:printed-by>Archivos PDF</meta:printed-by>
    <dc:date>2026-06-19T13:58:05.678324000</dc:date>
    <meta:document-statistic meta:table-count="7" meta:image-count="2" meta:object-count="0" meta:page-count="2" meta:paragraph-count="56" meta:word-count="166" meta:character-count="1199" meta:non-whitespace-character-count="1057"/>
  </office:meta>
</office:document-meta>
</file>